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7E00000334598B2F3CA3F7A6D3.png" manifest:media-type="image/png"/>
  <manifest:file-entry manifest:full-path="Pictures/100002010000067E00000334876C5C638CEE7C0A.png" manifest:media-type="image/png"/>
  <manifest:file-entry manifest:full-path="Pictures/100002010000067E00000334929115611CD9861C.png" manifest:media-type="image/png"/>
  <manifest:file-entry manifest:full-path="Pictures/100002010000067E000002D869561F9C33C313CB.png" manifest:media-type="image/png"/>
  <manifest:file-entry manifest:full-path="Pictures/100002010000067E000002F6F2179A0D1AF35633.png" manifest:media-type="image/png"/>
  <manifest:file-entry manifest:full-path="Pictures/100002010000067E000001FE0F9A83643534D76F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4217in" fo:text-indent="-0.3929in" style:auto-text-indent="false"/>
    </style:style>
    <style:style style:name="P2" style:family="paragraph" style:parent-style-name="Standard">
      <style:paragraph-properties fo:margin-left="0in" fo:margin-right="-0.4217in" fo:text-indent="-0.3929in" style:auto-text-indent="false"/>
      <style:text-properties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left="0in" fo:margin-right="-0.4217in" fo:text-indent="-0.3929in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4" style:family="paragraph" style:parent-style-name="Standard">
      <style:paragraph-properties fo:margin-left="0in" fo:margin-right="-0.4217in" fo:text-indent="-0.3929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left="0in" fo:margin-right="-0.4217in" fo:text-indent="-0.3929in" style:auto-text-indent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6" style:family="paragraph" style:parent-style-name="Standard">
      <style:paragraph-properties fo:margin-left="0in" fo:margin-right="-0.4217in" fo:text-align="center" style:justify-single-word="false" fo:text-indent="-0.3929in" style:auto-text-indent="false"/>
    </style:style>
    <style:style style:name="P7" style:family="paragraph" style:parent-style-name="Standard" style:master-page-name="Standard">
      <style:paragraph-properties fo:margin-left="0in" fo:margin-right="-0.4217in" fo:text-indent="-0.3929in" style:auto-text-indent="false" style:page-number="1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5pt" style:font-name-asian="Times New Roman1" style:font-size-asian="15pt" style:font-name-complex="Times New Roman1" style:font-size-complex="1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Name: </text:span><text:span text:style-name="T2">Nava, Gweaneth Charm Lavee D.</text:span><text:span text:style-name="T1"> <text:s text:c="11"/>Block:</text:span><text:span text:style-name="T2">22-ITE-03</text:span><text:span text:style-name="T1"> <text:s text:c="15"/>Date: </text:span><text:span text:style-name="T2">April 24, 2026</text:span></text:p>
      <text:p text:style-name="P2"/>
      <text:p text:style-name="P6"><text:span text:style-name="T4">MongoDB </text:span></text:p>
      <text:p text:style-name="P6"><text:span text:style-name="T4">Async Flow Exercise</text:span></text:p>
      <text:p text:style-name="P5"/>
      <text:p text:style-name="P1"><text:span text:style-name="T3">Lab Instructions:</text:span></text:p>
      <text:p text:style-name="P3"/>
      <text:p text:style-name="P1"><text:span text:style-name="T3"><text:s/>Step 1: Understanding Synchronous Execution </text:span></text:p>
      <text:p text:style-name="P1"><text:span text:style-name="T3">Subtask 1.1:</text:span><text:span text:style-name="T1"> Write Basic Sync Code Description: Write simple console.log statements. </text:span></text:p>
      <text:p text:style-name="P1"><text:span text:style-name="T3">Example: </text:span></text:p>
      <text:p text:style-name="P1"><text:span text:style-name="T1">console.log("A"); </text:span></text:p>
      <text:p text:style-name="P1"><text:span text:style-name="T1">console.log("B"); </text:span></text:p>
      <text:p text:style-name="P1"><text:span text:style-name="T1">console.log("C");</text:span></text:p>
      <text:p text:style-name="P4"/>
      <text:p text:style-name="P1"><text:span text:style-name="T1">CODE &amp; OUTPUT:</text:span></text:p>
      <text:p text:style-name="P1"><draw:frame draw:style-name="fr1" draw:name="image1.png" text:anchor-type="as-char" svg:width="6.222in" svg:height="1.902in" draw:z-index="0"><draw:image xlink:href="Pictures/100002010000067E000001FE0F9A83643534D76F.png" xlink:type="simple" xlink:show="embed" xlink:actuate="onLoad" loext:mime-type="image/png"/></draw:frame></text:p>
      <text:p text:style-name="P4"/>
      <text:p text:style-name="P1"><text:span text:style-name="T3">Step 2: Introduction to setTimeout (Macrotask)</text:span></text:p>
      <text:p text:style-name="P1"><text:span text:style-name="T3"><text:s/>Subtask 2.1:</text:span><text:span text:style-name="T1"> Basic setTimeout Example Description: Add setTimeout with 0ms delay. </text:span></text:p>
      <text:p text:style-name="P1"><text:span text:style-name="T3">Example:</text:span></text:p>
      <text:p text:style-name="P1"><text:span text:style-name="T1"><text:s/>console.log("Start"); </text:span></text:p>
      <text:p text:style-name="P1"><text:span text:style-name="T1">setTimeout(() =&gt; { console.log("Timeout"); }, 0); </text:span></text:p>
      <text:p text:style-name="P1"><text:span text:style-name="T1">console.log("End");</text:span></text:p>
      <text:p text:style-name="P4"/>
      <text:p text:style-name="P1"><text:span text:style-name="T1">CODE &amp; OUTPUT:</text:span></text:p>
      <text:p text:style-name="P1"><text:soft-page-break/><draw:frame draw:style-name="fr1" draw:name="image3.png" text:anchor-type="as-char" svg:width="4.7756in" svg:height="2.1811in" draw:z-index="0"><draw:image xlink:href="Pictures/100002010000067E000002F6F2179A0D1AF35633.png" xlink:type="simple" xlink:show="embed" xlink:actuate="onLoad" loext:mime-type="image/png"/></draw:frame></text:p>
      <text:p text:style-name="P1"><text:span text:style-name="T1"><text:s/></text:span><text:span text:style-name="T3">Step 3: Introduction to Promises (Microtask) </text:span></text:p>
      <text:p text:style-name="P1"><text:span text:style-name="T3">Subtask 3.1:</text:span><text:span text:style-name="T1"> Basic Promise Example Description: Use Promise.resolve() with .then() </text:span></text:p>
      <text:p text:style-name="P1"><text:span text:style-name="T3">Example: </text:span></text:p>
      <text:p text:style-name="P1"><text:span text:style-name="T1">console.log("Start"); </text:span></text:p>
      <text:p text:style-name="P1"><text:span text:style-name="T1">Promise.resolve().then(() =&gt; { console.log("Promise"); }); </text:span></text:p>
      <text:p text:style-name="P1"><text:span text:style-name="T1">console.log("End"); </text:span></text:p>
      <text:p text:style-name="P4"/>
      <text:p text:style-name="P1"><text:span text:style-name="T1">CODE &amp; OUTPUT:</text:span></text:p>
      <text:p text:style-name="P1"><draw:frame draw:style-name="fr1" draw:name="image2.png" text:anchor-type="as-char" svg:width="5.4425in" svg:height="2.3866in" draw:z-index="0"><draw:image xlink:href="Pictures/100002010000067E000002D869561F9C33C313CB.png" xlink:type="simple" xlink:show="embed" xlink:actuate="onLoad" loext:mime-type="image/png"/></draw:frame></text:p>
      <text:p text:style-name="P4"/>
      <text:p text:style-name="P1"><text:span text:style-name="T3">Step 4: Microtask vs Macrotask Comparison </text:span></text:p>
      <text:p text:style-name="P1"><text:span text:style-name="T3">Subtask 4.1:</text:span><text:span text:style-name="T1"> Combine Promise &amp; setTimeout Description: Write code including both Promise and setTimeout. </text:span></text:p>
      <text:p text:style-name="P1"><text:span text:style-name="T3">Example: </text:span></text:p>
      <text:p text:style-name="P1"><text:span text:style-name="T1">console.log("Start"); setTimeout(() =&gt; { console.log("Timeout"); }, 0); </text:span></text:p>
      <text:p text:style-name="P1"><text:span text:style-name="T1">Promise.resolve().then(() =&gt; { console.log("Promise"); }); c</text:span></text:p>
      <text:p text:style-name="P1"><text:span text:style-name="T1">onsole.log("End");</text:span></text:p>
      <text:p text:style-name="P4"/>
      <text:p text:style-name="P1"><text:span text:style-name="T1">CODE &amp; OUTPUT:</text:span></text:p>
      <text:p text:style-name="P1"><draw:frame draw:style-name="fr1" draw:name="image4.png" text:anchor-type="as-char" svg:width="6.2681in" svg:height="3.0972in" draw:z-index="0"><draw:image xlink:href="Pictures/100002010000067E00000334929115611CD9861C.png" xlink:type="simple" xlink:show="embed" xlink:actuate="onLoad" loext:mime-type="image/png"/></draw:frame></text:p>
      <text:p text:style-name="P3"/>
      <text:p text:style-name="P1"><text:span text:style-name="T3"><text:s/>Step 5: Async/Await Flow</text:span><text:span text:style-name="T1"> </text:span></text:p>
      <text:p text:style-name="P1"><text:span text:style-name="T3">Subtask 5.1: </text:span><text:span text:style-name="T1">Create Async Function Description: Use async function with await Promise. </text:span></text:p>
      <text:p text:style-name="P1"><text:span text:style-name="T3">Example:</text:span></text:p>
      <text:p text:style-name="P1"><text:span text:style-name="T1"><text:s/>async function test() { console.log("1"); </text:span></text:p>
      <text:p text:style-name="P1"><text:span text:style-name="T1">await Promise.resolve(); console.log("2"); } console.log("3"); test();</text:span></text:p>
      <text:p text:style-name="P1"><text:soft-page-break/><text:span text:style-name="T1"><text:s/>console.log("4");</text:span></text:p>
      <text:p text:style-name="P4"/>
      <text:p text:style-name="P1"><text:span text:style-name="T1">CODE &amp; OUTPUT:</text:span></text:p>
      <text:p text:style-name="P1"><draw:frame draw:style-name="fr1" draw:name="image5.png" text:anchor-type="as-char" svg:width="5.6602in" svg:height="2.7925in" draw:z-index="0"><draw:image xlink:href="Pictures/100002010000067E00000334876C5C638CEE7C0A.png" xlink:type="simple" xlink:show="embed" xlink:actuate="onLoad" loext:mime-type="image/png"/></draw:frame></text:p>
      <text:p text:style-name="P4"/>
      <text:p text:style-name="P1"><text:span text:style-name="T3"><text:s/>Step 6: Advanced Flow Challenge </text:span></text:p>
      <text:p text:style-name="P1"><text:span text:style-name="T3">Subtask 6.1:</text:span><text:span text:style-name="T1"> Predict the Output Description: </text:span></text:p>
      <text:p text:style-name="P1"><text:span text:style-name="T3">Analyze the following code</text:span><text:span text:style-name="T1">: </text:span></text:p>
      <text:p text:style-name="P1"><text:span text:style-name="T1">console.log("A"); setTimeout(() =&gt; { console.log("B"); }, 0); </text:span></text:p>
      <text:p text:style-name="P1"><text:span text:style-name="T1">Promise.resolve().then(() =&gt; { console.log("C"); });</text:span></text:p>
      <text:p text:style-name="P1"><text:span text:style-name="T1"><text:s/>console.log("D");</text:span></text:p>
      <text:p text:style-name="P4"/>
      <text:p text:style-name="P1"><text:span text:style-name="T1">CODE &amp; OUTPUT:</text:span></text:p>
      <text:p text:style-name="P1"><draw:frame draw:style-name="fr1" draw:name="image6.png" text:anchor-type="as-char" svg:width="5.5256in" svg:height="2.7272in" draw:z-index="0"><draw:image xlink:href="Pictures/100002010000067E00000334598B2F3CA3F7A6D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6" meta:object-count="0" meta:page-count="3" meta:paragraph-count="52" meta:word-count="197" meta:character-count="1682" meta:non-whitespace-character-count="1470"/>
    <meta:generator>LibreOfficeDev/6.0.5.2$Linux_X86_64 LibreOffice_project/</meta:generator>
  </office:meta>
</office:document-meta>
</file>